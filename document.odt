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3"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4"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5"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6"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7"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8"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9"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10"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11"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12"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13"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style:font-name="times new roman" fo:font-size="12pt" style:font-size-asian="12pt" style:font-size-complex="12pt"/>
    </style:style>
    <style:style style:name="P14" style:family="paragraph" style:parent-style-name="Heading_20_3">
      <style:text-properties style:font-name="times new roman" fo:font-size="12pt" style:font-size-asian="12pt" style:font-size-complex="12pt"/>
    </style:style>
    <style:style style:name="P15" style:family="paragraph" style:parent-style-name="Quotations">
      <style:paragraph-properties fo:margin-left="0.3937in" fo:margin-right="0.3937in" fo:margin-top="0in" fo:margin-bottom="0.1965in" style:contextual-spacing="false" fo:line-height="114%" fo:text-indent="0in" style:auto-text-indent="false"/>
      <style:text-properties style:font-name="Google Sans Text"/>
    </style:style>
    <style:style style:name="P16" style:family="paragraph" style:parent-style-name="Quotations"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7"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18"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9"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0"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1" style:family="paragraph" style:parent-style-name="Text_20_body" style:list-style-name="L2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2" style:family="paragraph" style:parent-style-name="Text_20_body" style:list-style-name="L2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3" style:family="paragraph" style:parent-style-name="Text_20_body" style:list-style-name="L2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4" style:family="paragraph" style:parent-style-name="Text_20_body" style:list-style-name="L25">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5" style:family="paragraph" style:parent-style-name="Text_20_body" style:list-style-name="L26">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6" style:family="paragraph" style:parent-style-name="Text_20_body" style:list-style-name="L27">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7" style:family="paragraph" style:parent-style-name="Text_20_body" style:list-style-name="L28">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8"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29" style:family="paragraph" style:parent-style-name="Text_20_body" style:list-style-name="L29">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30" style:family="paragraph" style:parent-style-name="Text_20_body">
      <style:text-properties style:font-name="Google Sans Text" fo:font-size="12pt" officeooo:paragraph-rsid="00073773" style:font-size-asian="12pt" style:font-size-complex="12pt"/>
    </style:style>
    <style:style style:name="P31" style:family="paragraph" style:parent-style-name="Text_20_body">
      <style:paragraph-properties fo:margin-left="0in" fo:margin-right="0in" fo:margin-top="0in" fo:margin-bottom="0.0972in" style:contextual-spacing="false" fo:line-height="114%" fo:text-indent="0in" style:auto-text-indent="false"/>
    </style:style>
    <style:style style:name="P32"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3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4"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5"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6"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7"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8"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9"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0"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1"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2"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3" style:family="paragraph" style:parent-style-name="Text_20_body" style:list-style-name="L2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4" style:family="paragraph" style:parent-style-name="Text_20_body" style:list-style-name="L2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5" style:family="paragraph" style:parent-style-name="Text_20_body" style:list-style-name="L2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6" style:family="paragraph" style:parent-style-name="Text_20_body" style:list-style-name="L2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7" style:family="paragraph" style:parent-style-name="Text_20_body" style:list-style-name="L2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8"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P49"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style>
    <style:style style:name="P50" style:family="paragraph" style:parent-style-name="Text_20_body" style:list-style-name="L25">
      <style:paragraph-properties fo:margin-left="0in" fo:margin-right="0in" fo:margin-top="0in" fo:margin-bottom="0.0972in" style:contextual-spacing="false" fo:line-height="114%" fo:text-indent="0in" style:auto-text-indent="false" fo:padding="0in" fo:border="none"/>
    </style:style>
    <style:style style:name="P51" style:family="paragraph" style:parent-style-name="Text_20_body" style:list-style-name="L26">
      <style:paragraph-properties fo:margin-left="0in" fo:margin-right="0in" fo:margin-top="0in" fo:margin-bottom="0.0972in" style:contextual-spacing="false" fo:line-height="114%" fo:text-indent="0in" style:auto-text-indent="false" fo:padding="0in" fo:border="none"/>
    </style:style>
    <style:style style:name="P52" style:family="paragraph" style:parent-style-name="Text_20_body" style:list-style-name="L27">
      <style:paragraph-properties fo:margin-left="0in" fo:margin-right="0in" fo:margin-top="0in" fo:margin-bottom="0.0972in" style:contextual-spacing="false" fo:line-height="114%" fo:text-indent="0in" style:auto-text-indent="false" fo:padding="0in" fo:border="none"/>
    </style:style>
    <style:style style:name="P53" style:family="paragraph" style:parent-style-name="Text_20_body" style:list-style-name="L28">
      <style:paragraph-properties fo:margin-left="0in" fo:margin-right="0in" fo:margin-top="0in" fo:margin-bottom="0.0972in" style:contextual-spacing="false" fo:line-height="114%" fo:text-indent="0in" style:auto-text-indent="false" fo:padding="0in" fo:border="none"/>
    </style:style>
    <style:style style:name="P5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5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2"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8"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69"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0"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1"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2"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3"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4"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5"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6"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7"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8"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79"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0"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1"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2"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3"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4"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5"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6"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7"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8"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89"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0"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1"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2"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3"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4"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5"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6"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7"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8"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99"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0"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1"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2"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3"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4"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5"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6"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7"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8"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09"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0" style:family="paragraph" style:parent-style-name="Text_20_body" style:list-style-name="L1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1" style:family="paragraph" style:parent-style-name="Text_20_body" style:list-style-name="L1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2" style:family="paragraph" style:parent-style-name="Text_20_body" style:list-style-name="L1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3" style:family="paragraph" style:parent-style-name="Text_20_body" style:list-style-name="L1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4" style:family="paragraph" style:parent-style-name="Text_20_body" style:list-style-name="L1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5" style:family="paragraph" style:parent-style-name="Text_20_body" style:list-style-name="L1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6"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7"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8"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19"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20" style:family="paragraph" style:parent-style-name="Text_20_body" style:list-style-name="L2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21" style:family="paragraph" style:parent-style-name="Text_20_body" style:list-style-name="L2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22" style:family="paragraph" style:parent-style-name="Text_20_body" style:list-style-name="L2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23"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24"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25"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26" style:family="paragraph" style:parent-style-name="Text_20_body" style:list-style-name="L2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27" style:family="paragraph" style:parent-style-name="Text_20_body" style:list-style-name="L2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28" style:family="paragraph" style:parent-style-name="Text_20_body" style:list-style-name="L2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2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3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31" style:family="paragraph" style:parent-style-name="Text_20_body" style:list-style-name="L2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32" style:family="paragraph" style:parent-style-name="Text_20_body" style:list-style-name="L2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133" style:family="paragraph" style:parent-style-name="Text_20_body">
      <style:text-properties fo:color="#1f1f1f" loext:opacity="100%" style:font-name="Google Sans Text" fo:font-size="12pt" style:font-size-asian="12pt" style:font-size-complex="12pt"/>
    </style:style>
    <style:style style:name="P134" style:family="paragraph" style:parent-style-name="Text_20_body">
      <style:text-properties fo:color="#1f1f1f" loext:opacity="100%" style:font-name="times new roman" fo:font-size="12pt" style:font-size-asian="12pt" style:font-size-complex="12pt"/>
    </style:style>
    <style:style style:name="P135" style:family="paragraph" style:parent-style-name="Text_20_body">
      <style:text-properties style:font-name="times new roman" fo:font-size="12pt" style:font-size-asian="12pt" style:font-size-complex="12pt"/>
    </style:style>
    <style:style style:name="P136" style:family="paragraph" style:parent-style-name="Text_20_body" style:list-style-name="L14">
      <style:text-properties style:font-name="times new roman" fo:font-size="12pt" style:font-size-asian="12pt" style:font-size-complex="12pt"/>
    </style:style>
    <style:style style:name="P137" style:family="paragraph" style:parent-style-name="Text_20_body" style:list-style-name="L15">
      <style:text-properties style:font-name="times new roman" fo:font-size="12pt" style:font-size-asian="12pt" style:font-size-complex="12pt"/>
    </style:style>
    <style:style style:name="P138" style:family="paragraph" style:parent-style-name="Text_20_body" style:list-style-name="L16">
      <style:text-properties style:font-name="times new roman" fo:font-size="12pt" style:font-size-asian="12pt" style:font-size-complex="12pt"/>
    </style:style>
    <style:style style:name="P139" style:family="paragraph" style:parent-style-name="Text_20_body" style:list-style-name="L17">
      <style:text-properties style:font-name="times new roman" fo:font-size="12pt" style:font-size-asian="12pt" style:font-size-complex="12pt"/>
    </style:style>
    <style:style style:name="P140" style:family="paragraph" style:parent-style-name="Text_20_body" style:list-style-name="L18">
      <style:text-properties style:font-name="times new roman" fo:font-size="12pt" style:font-size-asian="12pt" style:font-size-complex="12pt"/>
    </style:style>
    <style:style style:name="P141" style:family="paragraph" style:parent-style-name="Text_20_body" style:list-style-name="L19">
      <style:text-properties style:font-name="times new roman" fo:font-size="12pt" style:font-size-asian="12pt" style:font-size-complex="12pt"/>
    </style:style>
    <style:style style:name="P142" style:family="paragraph" style:parent-style-name="Text_20_body">
      <style:paragraph-properties fo:margin-left="0in" fo:margin-right="0in" fo:margin-top="0in" fo:margin-bottom="0in" style:contextual-spacing="false" fo:line-height="114%" fo:orphans="2" fo:widows="2" fo:text-indent="0in" style:auto-text-indent="false" fo:padding="0in" fo:border="none"/>
      <style:text-properties style:font-name="times new roman" fo:font-size="12pt" style:font-size-asian="12pt" style:font-size-complex="12pt"/>
    </style:style>
    <style:style style:name="P143" style:family="paragraph" style:parent-style-name="Text_20_body" style:list-style-name="L16">
      <style:text-properties style:font-name="times new roman" fo:font-size="12pt" officeooo:rsid="0006528b" officeooo:paragraph-rsid="0006528b" style:font-size-asian="12pt" style:font-size-complex="12pt"/>
    </style:style>
    <style:style style:name="P144" style:family="paragraph" style:parent-style-name="Text_20_body">
      <style:text-properties style:font-name="times new roman" fo:font-size="12pt" officeooo:paragraph-rsid="00073773" style:font-size-asian="12pt" style:font-size-complex="12pt"/>
    </style:style>
    <style:style style:name="T1" style:family="text">
      <style:text-properties style:font-name="Google Sans"/>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style="italic"/>
    </style:style>
    <style:style style:name="T6" style:family="text">
      <style:text-properties fo:font-style="italic" loext:padding="0in" loext:border="none"/>
    </style:style>
    <style:style style:name="T7" style:family="text">
      <style:text-properties fo:font-weight="bold"/>
    </style:style>
    <style:style style:name="T8" style:family="text">
      <style:text-properties fo:font-weight="bold" loext:padding="0in" loext:border="none"/>
    </style:style>
    <style:style style:name="T9" style:family="text">
      <style:text-properties loext:padding="0in" loext:border="none"/>
    </style:style>
    <style:style style:name="T10" style:family="text">
      <style:text-properties fo:color="#1f1f1f" loext:opacity="100%"/>
    </style:style>
    <style:style style:name="T11" style:family="text">
      <style:text-properties fo:color="#1f1f1f" loext:opacity="100%" style:font-name="Google Sans Text"/>
    </style:style>
    <style:style style:name="T12" style:family="text">
      <style:text-properties fo:color="#1f1f1f" loext:opacity="100%" style:font-name="Google Sans Text" fo:font-weight="bold" loext:padding="0in" loext:border="none"/>
    </style:style>
    <style:style style:name="T13" style:family="text">
      <style:text-properties fo:color="#1f1f1f" loext:opacity="100%" style:font-name="Google Sans Text" fo:font-style="italic" loext:padding="0in" loext:border="none"/>
    </style:style>
    <style:style style:name="T14" style:family="text">
      <style:text-properties fo:font-variant="normal" fo:text-transform="none" fo:color="#000000" loext:opacity="54%" style:font-name="Google Sans Text" fo:font-size="11.25pt" fo:font-style="normal" fo:font-weight="normal" loext:padding="0in" loext: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number text:level="3" text:style-name="Numbering_20_Symbols" loext:num-list-format="%3%." style:num-suffix="." style:num-format="1">
        <style:list-level-properties text:space-before="-0.1965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section text:style-name="Sect1" text:name="model-response-message-contentr_601f2b496d51b0b6">
        <text:h text:style-name="P13" text:outline-level="3"><text:span text:style-name="T10">1. Tabel Utama: employees (Data Inti Karyawan)</text:span></text:h>
        <text:p text:style-name="P135">Tabel ini menyimpan data primer yang hampir tidak pernah berubah dan menjadi pusat relasi bagi tabel-tabel lainnya.</text:p>
        <text:list text:style-name="L14">
          <text:list-item>
            <text:p text:style-name="P136">id (PK) -&gt; Ini yang dijadikan NIK internal sistem</text:p>
          </text:list-item>
          <text:list-item>
            <text:p text:style-name="P136">nama_lengkap (VARCHAR)</text:p>
          </text:list-item>
          <text:list-item>
            <text:p text:style-name="P136">nama_panggilan (VARCHAR)</text:p>
          </text:list-item>
          <text:list-item>
            <text:p text:style-name="P136">nomor_ktp (VARCHAR - Unique)</text:p>
          </text:list-item>
          <text:list-item>
            <text:p text:style-name="P136">tempat_lahir (VARCHAR)</text:p>
          </text:list-item>
          <text:list-item>
            <text:p text:style-name="P136">tanggal_lahir (DATE)</text:p>
          </text:list-item>
          <text:list-item>
            <text:p text:style-name="P136">jenis_kelamin (ENUM)</text:p>
          </text:list-item>
          <text:list-item>
            <text:p text:style-name="P136">agama (VARCHAR)</text:p>
          </text:list-item>
          <text:list-item>
            <text:p text:style-name="P136">golongan_darah (VARCHAR)</text:p>
          </text:list-item>
          <text:list-item>
            <text:p text:style-name="P136">status_pernikahan (ENUM)</text:p>
          </text:list-item>
          <text:list-item>
            <text:p text:style-name="P136">foto_profile (VARCHAR)</text:p>
          </text:list-item>
          <text:list-item>
            <text:p text:style-name="P136">status_akun (ENUM)</text:p>
          </text:list-item>
        </text:list>
        <text:h text:style-name="P14" text:outline-level="3">2. Tabel Kontak &amp; Alamat: employee_contacts</text:h>
        <text:p text:style-name="P135">Dipisah agar jika di kemudian hari karyawan memiliki lebih dari satu nomor telp atau alamat (KTP vs Domisili), struktur tabel utama tidak rusak.</text:p>
        <text:list text:style-name="L15">
          <text:list-item>
            <text:p text:style-name="P137">id (PK)</text:p>
          </text:list-item>
          <text:list-item>
            <text:p text:style-name="P137">employee_id (FK ke employees.id)</text:p>
          </text:list-item>
          <text:list-item>
            <text:p text:style-name="P137">email (VARCHAR - Unique)</text:p>
          </text:list-item>
          <text:list-item>
            <text:p text:style-name="P137">nomor_telp (VARCHAR)</text:p>
          </text:list-item>
          <text:list-item>
            <text:p text:style-name="P137">alamat (TEXT)</text:p>
          </text:list-item>
          <text:list-item>
            <text:p text:style-name="P137">nama_kontak_darurat (VARCHAR)</text:p>
          </text:list-item>
          <text:list-item>
            <text:p text:style-name="P137">hubungan_kontak_darurat (VARCHAR)</text:p>
          </text:list-item>
          <text:list-item>
            <text:p text:style-name="P137">nomor_kontak_darurat (VARCHAR)</text:p>
          </text:list-item>
        </text:list>
        <text:h text:style-name="P14" text:outline-level="3">3. Tabel Karir &amp; Pekerjaan: employee_careers</text:h>
        <text:p text:style-name="P135">Memisahkan data pekerjaan sangat penting dalam HRIS profesional agar riwayat perpindahan jabatan atau kontrak karyawan bisa tercatat dengan rapi.</text:p>
        <text:list text:style-name="L16">
          <text:list-item>
            <text:p text:style-name="P138">id (PK)</text:p>
          </text:list-item>
          <text:list-item>
            <text:p text:style-name="P138">employee_id (FK ke employees.id)</text:p>
          </text:list-item>
          <text:list-item>
            <text:p text:style-name="P138">status_karyawan (ENUM)</text:p>
          </text:list-item>
          <text:list-item>
            <text:p text:style-name="P138"><text:soft-page-break/>tanggal_mulai_bergabung (DATE)</text:p>
          </text:list-item>
          <text:list-item>
            <text:p text:style-name="P138">tanggal_berakhir_kontrak (DATE)</text:p>
          </text:list-item>
          <text:list-item>
            <text:p text:style-name="P138">unit (VARCHAR)</text:p>
          </text:list-item>
          <text:list-item>
            <text:p text:style-name="P143">bidang </text:p>
          </text:list-item>
          <text:list-item>
            <text:p text:style-name="P138">posisi (VARCHAR)</text:p>
          </text:list-item>
        </text:list>
        <text:h text:style-name="P14" text:outline-level="3">4. Tabel Finansial &amp; Legal: employee_financials</text:h>
        <text:p text:style-name="P135">Data finansial dipisahkan demi keamanan tingkat tinggi, karena biasanya hanya tim Payroll atau Finance yang boleh mengakses bagian ini.</text:p>
        <text:list text:style-name="L17">
          <text:list-item>
            <text:p text:style-name="P139">id (PK)</text:p>
          </text:list-item>
          <text:list-item>
            <text:p text:style-name="P139">employee_id (FK ke employees.id)</text:p>
          </text:list-item>
          <text:list-item>
            <text:p text:style-name="P139">nomor_rekening (VARCHAR)</text:p>
          </text:list-item>
          <text:list-item>
            <text:p text:style-name="P139">nama_bank (VARCHAR)</text:p>
          </text:list-item>
          <text:list-item>
            <text:p text:style-name="P139">nama_pemilik_rekening (VARCHAR)</text:p>
          </text:list-item>
          <text:list-item>
            <text:p text:style-name="P139">npwp (VARCHAR)</text:p>
          </text:list-item>
          <text:list-item>
            <text:p text:style-name="P139">bpjstk (VARCHAR)</text:p>
          </text:list-item>
        </text:list>
        <text:h text:style-name="P14" text:outline-level="3">5. Tabel Pendidikan &amp; Kompetensi: employee_educations</text:h>
        <text:p text:style-name="P135">Menggunakan relasi satu karyawan bisa memiliki banyak riwayat pendidikan atau sertifikat.</text:p>
        <text:list text:style-name="L18">
          <text:list-item>
            <text:p text:style-name="P140">id (PK)</text:p>
          </text:list-item>
          <text:list-item>
            <text:p text:style-name="P140">employee_id (FK ke employees.id)</text:p>
          </text:list-item>
          <text:list-item>
            <text:p text:style-name="P140">pendidikan_terakhir (ENUM)</text:p>
          </text:list-item>
          <text:list-item>
            <text:p text:style-name="P140">institusi_pendidikan (VARCHAR)</text:p>
          </text:list-item>
          <text:list-item>
            <text:p text:style-name="P140">tahun_kelulusan (YEAR)</text:p>
          </text:list-item>
          <text:list-item>
            <text:p text:style-name="P140">file_ijazah (VARCHAR) -&gt; [BARU] Path atau URL berkas unggahan ijazah</text:p>
          </text:list-item>
          <text:list-item>
            <text:p text:style-name="P140">sertifikat_profesional (TEXT atau JSON)</text:p>
          </text:list-item>
          <text:list-item>
            <text:p text:style-name="P140">keahlian_utama (TEXT atau JSON)</text:p>
          </text:list-item>
        </text:list>
        <text:h text:style-name="P14" text:outline-level="3">6. Tabel Berkas Dokumen: employee_documents [BARU]</text:h>
        <text:p text:style-name="P135">Wadah khusus untuk mengunggah semua dokumen legalitas/onboarding karyawan agar tidak menumpuk di tabel utama.</text:p>
        <text:list text:style-name="L19">
          <text:list-item>
            <text:p text:style-name="P141">id (PK)</text:p>
          </text:list-item>
          <text:list-item>
            <text:p text:style-name="P141">employee_id (FK ke employees.id)</text:p>
          </text:list-item>
          <text:list-item>
            <text:p text:style-name="P141">file_ktp (VARCHAR) -&gt; [BARU] Path atau URL berkas unggahan KTP</text:p>
          </text:list-item>
          <text:list-item>
            <text:p text:style-name="P141">file_kk (VARCHAR) -&gt; [BARU] Path atau URL berkas unggahan Kartu Keluarga</text:p>
          </text:list-item>
          <text:list-item>
            <text:p text:style-name="P141"><text:soft-page-break/>file_skck (VARCHAR) -&gt; [BARU] Path atau URL berkas unggahan SKCK</text:p>
          </text:list-item>
          <text:list-item>
            <text:p text:style-name="P141">tanggal_kadaluarsa_skck (DATE)</text:p>
          </text:list-item>
        </text:list>
        <text:p text:style-name="P142"><text:span text:style-name="T10"/></text:p>
      </text:section>
      <text:p text:style-name="P135"/>
      <text:p text:style-name="P135"/>
      <text:p text:style-name="P135">Saat HR menambah karyawan baru (*onboarding*), mereka **tidak perlu mengisi semua field sekaligus**. Di sistem HRIS profesional, proses ini dibagi menjadi beberapa tahap, atau minimal diisi data-data krusialnya dulu agar akun karyawan tersebut bisa dibuat. Data lainnya (seperti nomor rekening atau berkas ijazah) bisa dilengkapi nanti, baik oleh HR maupun oleh karyawan sendiri lewat fitur *Self-Service*.</text:p>
      <text:p text:style-name="P135"/>
      <text:p text:style-name="P135">Berikut adalah klasifikasi *field* yang wajib diisi dan yang bisa menyusul saat proses tambah karyawan:</text:p>
      <text:p text:style-name="P135"/>
      <text:p text:style-name="P135">### 1. Field Wajib (Must Have) – Akun Tidak Bisa Dibuat Jika Kosong</text:p>
      <text:p text:style-name="P135"/>
      <text:p text:style-name="P135">*Field* ini harus ada di form utama tambah karyawan karena digunakan untuk identifikasi dasar, login sistem, dan penempatan kerja.</text:p>
      <text:p text:style-name="P135"/>
      <text:p text:style-name="P135">* **id (NIK Internal):** Biasanya di-generate otomatis oleh sistem sesuai pola perusahaan, atau diinput manual oleh HR.</text:p>
      <text:p text:style-name="P135">* **Nama Lengkap:** Untuk verifikasi identitas resmi.</text:p>
      <text:p text:style-name="P135">* **Email (Kantor/Pribadi):** Sangat penting karena sistem akan otomatis mengirimkan email aktivasi akun dan password ke email ini.</text:p>
      <text:p text:style-name="P135">* **Status Karyawan:** Harus ditentukan di awal (Kontrak/Tetap/Magang) untuk menentukan masa berlaku akun.</text:p>
      <text:p text:style-name="P135">* **Tanggal Mulai Bergabung (Join Date):** Menentukan kapan karyawan resmi aktif di sistem dan mulai dihitung absensinya.</text:p>
      <text:p text:style-name="P135">* **Unit / Departemen:** Agar sistem tahu karyawan ini masuk ke kelompok kerja mana.</text:p>
      <text:p text:style-name="P135">* **Posisi / Jabatan:** Menentukan struktur *role* dan tanggung jawabnya.</text:p>
      <text:p text:style-name="P135">* **Status Akun:** Default-nya langsung diatur ke **Aktif**.</text:p>
      <text:p text:style-name="P135"/>
      <text:p text:style-name="P135">---</text:p>
      <text:p text:style-name="P135"/>
      <text:p text:style-name="P135">### 2. Field Pendukung Penting (Sebaiknya Diisi Saat Onboarding)</text:p>
      <text:p text:style-name="P135"><text:soft-page-break/></text:p>
      <text:p text:style-name="P135">*Field* ini idealnya diisi oleh HR saat input awal jika berkas fisik karyawan sudah lengkap di meja HR.</text:p>
      <text:p text:style-name="P135"/>
      <text:p text:style-name="P135">* **Nomor KTP:** Untuk validasi data legal.</text:p>
      <text:p text:style-name="P135">* **Tempat &amp; Tanggal Lahir:** Penting untuk keperluan data ketenagakerjaan dasar.</text:p>
      <text:p text:style-name="P135">* **Nomor Telepon/WhatsApp:** Untuk jalur komunikasi cepat.</text:p>
      <text:p text:style-name="P135">* **Jenis Kelamin &amp; Agama:** Dibutuhkan untuk keperluan data dasar dan perhitungan hak libur/hari raya.</text:p>
      <text:p text:style-name="P135">* **Status Pernikahan:** Penting di awal jika sistem penggajian langsung membaca status pajak (PTKP).</text:p>
      <text:p text:style-name="P135"/>
      <text:p text:style-name="P135">---</text:p>
      <text:p text:style-name="P135"/>
      <text:p text:style-name="P135">### 3. Field Opsional (Bisa Menyusul / Diisi Sendiri oleh Karyawan)</text:p>
      <text:p text:style-name="P135"/>
      <text:p text:style-name="P135">*Field* ini bisa dikosongkan dulu saat HR mengklik tombol "Simpan Karyawan Baru". Sistem profesional biasanya memberikan akses kepada karyawan baru untuk mencicil pengisian data ini melalui profil mereka masing-masing (*Employee Self-Service*):</text:p>
      <text:p text:style-name="P135"/>
      <text:p text:style-name="P135">* **Data Finansial:** Nomor rekening, nama bank, nama pemilik rekening (biasanya baru ditagih menjelang tanggal cut-off payroll).</text:p>
      <text:p text:style-name="P135">* **Nomor NPWP &amp; BPJSTK:** Bisa menyusul setelah HR atau karyawan melakukan pengurusan dokumen.</text:p>
      <text:p text:style-name="P135">* **Data Kontak Darurat:** Nama, hubungan, dan nomor telepon darurat.</text:p>
      <text:p text:style-name="P135">* **Riwayat Pendidikan &amp; Keahlian:** Nama universitas, tahun kelulusan, sertifikat, dan keahlian utama.</text:p>
      <text:p text:style-name="P135">* **Semua File Upload (Dokumen):** Upload KTP, upload KK, upload SKCK, dan upload Ijazah. Berkas digital ini bisa diunggah mandiri oleh karyawan dalam minggu pertama mereka bekerja.</text:p>
      <text:p text:style-name="P135">* **Foto Profil:** Karyawan bisa mengunggah foto formal mereka sendiri setelah berhasil login ke aplikasi.</text:p>
      <text:p text:style-name="P135"/>
      <text:p text:style-name="P135">### 💡 Alur (Flow) Rekomendasi pada Aplikasi:</text:p>
      <text:p text:style-name="P135"/>
      <text:p text:style-name="P135"><text:soft-page-break/>Buatlah form tambah karyawan dengan **2 atau 3 tahapan (Wizard Form)** atau beri tanda bintang merah `*` hanya pada bagian **Data Inti &amp; Pekerjaan**.</text:p>
      <text:p text:style-name="P135"/>
      <text:p text:style-name="P135">Begitu HR klik **"Simpan"**, sistem akan membuat baris baru di tabel `employees` dan `employee_careers`, lalu otomatis membuat akun user agar karyawan bisa login dan melengkapi sisa data (alamat, rekening, dan upload berkas) dari laptop atau handphone mereka sendiri. Cara ini akan sangat meringankan pekerjaan HR.</text:p>
      <text:p text:style-name="P135"/>
      <text:p text:style-name="P135"/>
      <text:p text:style-name="P135"/>
      <text:p text:style-name="P135"/>
      <text:p text:style-name="P135"/>
      <text:p text:style-name="P133">Melihat sisa progres aplikasi kamu yang sudah 80% dan adanya 14 poin revisi dari dosen, kunci utamanya adalah <text:span text:style-name="T8">strategi eksekusi</text:span>. Jangan dikerjakan acak. Kamu harus mendahului revisi yang sifatnya <text:span text:style-name="T8">merusak/mengubah struktur database (Breaking Changes)</text:span>, baru kemudian fitur CRUD, logika bisnis, dan terakhir kosmetik (bahasa/pesan error).</text:p>
      <text:section text:style-name="Sect1" text:name="model-response-message-contentr_f818f1b484e4d61b">
        <text:p text:style-name="P54">Berikut adalah urutan prioritas kerja (Roadmap) yang paling efisien agar codingan kamu tidak tumpang tindih:</text:p>
        <text:h text:style-name="P2" text:outline-level="2">PRIORITAS 1: Struktur Database &amp; Auth (Kerjakan Ini Pertama Kali)</text:h>
        <text:p text:style-name="P54">Jika ini tidak didahului, semua codingan Controller dan API yang sudah kamu buat bisa <text:span text:style-name="T6">error</text:span> massal.</text:p>
        <text:list text:style-name="L20">
          <text:list-item>
            <text:p text:style-name="P34"><text:span text:style-name="T12">Langkah 1 (Poin 3): Pindahkan </text:span><text:span text:style-name="Source_20_Text"><text:span text:style-name="T14">status_akun</text:span></text:span><text:span text:style-name="T12"> dan </text:span><text:span text:style-name="Source_20_Text"><text:span text:style-name="T14">email</text:span></text:span><text:span text:style-name="T12"> ke tabel </text:span><text:span text:style-name="Source_20_Text"><text:span text:style-name="T14">users</text:span></text:span><text:span text:style-name="T12">.</text:span></text:p>
            <text:list>
              <text:list-item>
                <text:p text:style-name="P34"><text:span text:style-name="T13">Action:</text:span><text:span text:style-name="T11"> Jalankan migrasi database baru. Pastikan tabel </text:span><text:span text:style-name="Source_20_Text"><text:span text:style-name="T14">users</text:span></text:span><text:span text:style-name="T11"> memiliki </text:span><text:span text:style-name="Source_20_Text"><text:span text:style-name="T14">employee_id</text:span></text:span><text:span text:style-name="T11"> (atau </text:span><text:span text:style-name="Source_20_Text"><text:span text:style-name="T14">pegawai_id</text:span></text:span><text:span text:style-name="T11">) sebagai relasi, serta simpan </text:span><text:span text:style-name="Source_20_Text"><text:span text:style-name="T14">email</text:span></text:span><text:span text:style-name="T11">, </text:span><text:span text:style-name="Source_20_Text"><text:span text:style-name="T14">password</text:span></text:span><text:span text:style-name="T11">, dan </text:span><text:span text:style-name="Source_20_Text"><text:span text:style-name="T14">status_akun</text:span></text:span><text:span text:style-name="T11"> di sana.</text:span></text:p>
              </text:list-item>
            </text:list>
          </text:list-item>
          <text:list-item>
            <text:p text:style-name="P123">Langkah 2 (Poin 1): Update <text:span text:style-name="T5">Role</text:span> Spesifik di Sistem.</text:p>
            <text:list>
              <text:list-item>
                <text:p text:style-name="P34"><text:span text:style-name="T11">Ubah ENUM atau seeder role kamu di tabel </text:span><text:span text:style-name="Source_20_Text"><text:span text:style-name="T14">users</text:span></text:span><text:span text:style-name="T11"> atau tabel </text:span><text:span text:style-name="Source_20_Text"><text:span text:style-name="T14">roles</text:span></text:span><text:span text:style-name="T11"> menjadi:</text:span></text:p>
                <text:list>
                  <text:list-item>
                    <text:p text:style-name="P34"><text:span text:style-name="Source_20_Text"><text:span text:style-name="T14">Direktur Utama</text:span></text:span><text:span text:style-name="T11"> (Pimpinan)</text:span></text:p>
                  </text:list-item>
                  <text:list-item>
                    <text:p text:style-name="P34"><text:span text:style-name="Source_20_Text"><text:span text:style-name="T14">Manager Keuangan</text:span></text:span><text:span text:style-name="T11"> (Keuangan)</text:span></text:p>
                  </text:list-item>
                  <text:list-item>
                    <text:p text:style-name="P34"><text:span text:style-name="Source_20_Text"><text:span text:style-name="T14">Pegawai</text:span></text:span><text:span text:style-name="T11"> (Staff)</text:span></text:p>
                  </text:list-item>
                  <text:list-item>
                    <text:p text:style-name="P34"><text:span text:style-name="Source_20_Text"><text:span text:style-name="T14">Wakil Direktur</text:span></text:span><text:span text:style-name="T11"> (HR)</text:span></text:p>
                  </text:list-item>
                  <text:list-item>
                    <text:p text:style-name="P34"><text:span text:style-name="Source_20_Text"><text:span text:style-name="T14">Manager Administrasi</text:span></text:span><text:span text:style-name="T11"> (Manager)</text:span></text:p>
                  </text:list-item>
                </text:list>
              </text:list-item>
            </text:list>
          </text:list-item>
        </text:list>
        <text:h text:style-name="P2" text:outline-level="2"><text:soft-page-break/>PRIORITAS 2: CRUD Data Master (Pondasi Form Pegawai)</text:h>
        <text:p text:style-name="P54">Form input pegawai membutuhkan data Jabatan dan Unit. Jadi, buat fungsi CRUD ini terlebih dahulu sebelum masuk ke form pegawainya.</text:p>
        <text:list text:style-name="L21">
          <text:list-item>
            <text:p text:style-name="P124">Langkah 3 (Poin 4, 5, 6): Buat Fungsi CRUD Master.</text:p>
            <text:list>
              <text:list-item>
                <text:p text:style-name="P116">CRUD Jabatan (terhubung dengan penamaan baru: Direktur Utama, Manager Administrasi, dll).</text:p>
              </text:list-item>
              <text:list-item>
                <text:p text:style-name="P116">CRUD Unit / Bidang.</text:p>
              </text:list-item>
              <text:list-item>
                <text:p text:style-name="P116">CRUD Kategori <text:span text:style-name="T6">Daily Log</text:span>.</text:p>
              </text:list-item>
            </text:list>
          </text:list-item>
          <text:list-item>
            <text:p text:style-name="P124">Langkah 4 (Poin 2 &amp; Revisi Poin 3): Lengkapi Data Pegawai &amp; Konsistensi Istilah.</text:p>
            <text:list>
              <text:list-item>
                <text:p text:style-name="P116"><text:span text:style-name="T6">Action:</text:span> Buka form "Tambah Pegawai". Ganti semua teks "Karyawan" menjadi <text:span text:style-name="T8">"Pegawai"</text:span> (di UI, tombol, maupun penamaan field jika memungkinkan).</text:p>
              </text:list-item>
              <text:list-item>
                <text:p text:style-name="P42"><text:span text:style-name="T12">Poin 7:</text:span><text:span text:style-name="T11"> Di form ini, buat logika </text:span><text:span text:style-name="T13">Conditional Rendering</text:span><text:span text:style-name="T11"> (Javascript/Flutter/React). Jika HR memilih status </text:span><text:span text:style-name="Source_20_Text"><text:span text:style-name="T14">Kontrak</text:span></text:span><text:span text:style-name="T11"> atau </text:span><text:span text:style-name="Source_20_Text"><text:span text:style-name="T14">Magang</text:span></text:span><text:span text:style-name="T11">, maka </text:span><text:span text:style-name="T13">field</text:span><text:span text:style-name="T11"> </text:span><text:span text:style-name="Source_20_Text"><text:span text:style-name="T14">Tanggal Berakhir Kontrak</text:span></text:span><text:span text:style-name="T11"> wajib muncul dan diisi (</text:span><text:span text:style-name="Source_20_Text"><text:span text:style-name="T14">required</text:span></text:span><text:span text:style-name="T11">). Jika memilih </text:span><text:span text:style-name="Source_20_Text"><text:span text:style-name="T14">Tetap</text:span></text:span><text:span text:style-name="T11">, </text:span><text:span text:style-name="T13">field</text:span><text:span text:style-name="T11"> tersebut disembunyikan/dikosongkan.</text:span></text:p>
              </text:list-item>
            </text:list>
          </text:list-item>
        </text:list>
        <text:h text:style-name="P2" text:outline-level="2">PRIORITAS 3: Logika Bisnis &amp; Fitur (Absensi &amp; Cuti)</text:h>
        <text:p text:style-name="P54">Setelah data master aman, masuk ke fungsionalitas sistem.</text:p>
        <text:list text:style-name="L22">
          <text:list-item>
            <text:p text:style-name="P126">Langkah 5 (Poin 10 &amp; 12): Fitur Absensi.</text:p>
            <text:list>
              <text:list-item>
                <text:p text:style-name="P120"><text:span text:style-name="T8">Absen Pulang wajib Foto:</text:span> Tambahkan komponen kamera/upload file khusus pada method API/Controller absen pulang.</text:p>
              </text:list-item>
              <text:list-item>
                <text:p text:style-name="P43"><text:span text:style-name="T12">Filter Periode &amp; Durasi Telat:</text:span><text:span text:style-name="T11"> Di halaman riwayat absen (sisi Pegawai maupun HR), tambahkan komponen filter tanggal (Start Date - End Date). Di tabel database absen, buat </text:span><text:span text:style-name="T13">field</text:span><text:span text:style-name="T11"> </text:span><text:span text:style-name="Source_20_Text"><text:span text:style-name="T14">durasi_telat</text:span></text:span><text:span text:style-name="T11"> (menghitung selisih jam masuk pegawai dengan jam masuk ketentuan dalam satuan menit, misal: 15 menit).</text:span></text:p>
              </text:list-item>
            </text:list>
          </text:list-item>
          <text:list-item>
            <text:p text:style-name="P126">Langkah 6 (Poin 8, 11, 13): Fitur Cuti &amp; Klaim.</text:p>
            <text:list>
              <text:list-item>
                <text:p text:style-name="P43"><text:span text:style-name="T12">Cuti Bersama (Poin 8):</text:span><text:span text:style-name="T11"> Buat satu halaman/tabel statis berisi daftar hari libur &amp; cuti bersama tahun ini agar bisa dibaca oleh akun dengan role </text:span><text:span text:style-name="Source_20_Text"><text:span text:style-name="T14">Pegawai</text:span></text:span><text:span text:style-name="T11">.</text:span></text:p>
              </text:list-item>
              <text:list-item>
                <text:p text:style-name="P43"><text:span text:style-name="T12">Validasi Cuti Melahirkan (Poin 11):</text:span><text:span text:style-name="T11"> Di backend (Controller), sebelum menyimpan pengajuan cuti, beri validasi: </text:span><text:span text:style-name="Source_20_Text"><text:span text:style-name="T14">if (kategori == 'Melahirkan' &amp;&amp; pegawai.jenis_kelamin != 'Perempuan') { return error; }</text:span></text:span><text:span text:style-name="T11">.</text:span></text:p>
              </text:list-item>
              <text:list-item>
                <text:p text:style-name="P43"><text:span text:style-name="T12">Tanggal Klaim (Poin 13):</text:span><text:span text:style-name="T11"> Pada form pengajuan klaim keuangan, set validation pada input tanggal agar </text:span><text:span text:style-name="Source_20_Text"><text:span text:style-name="T14">min = date('Y-m-d')</text:span></text:span><text:span text:style-name="T11"> (hari ini). Pegawai tidak boleh memilih tanggal kemarin (backdate).</text:span></text:p>
              </text:list-item>
            </text:list>
          </text:list-item>
        </text:list>
        <text:h text:style-name="P2" text:outline-level="2">PRIORITAS 4: Finishing &amp; Handover</text:h>
        <text:list text:style-name="L23">
          <text:list-item>
            <text:p text:style-name="P128">Langkah 7 (Poin 9): Pesan Kesalahan (Error Handling).</text:p>
            <text:list>
              <text:list-item>
                <text:p text:style-name="P47"><text:soft-page-break/><text:span text:style-name="T11">Rapikan </text:span><text:span text:style-name="Source_20_Text"><text:span text:style-name="T14">try-catch</text:span></text:span><text:span text:style-name="T11"> di backend atau validasi request. Pastikan jika ada gagal login, salah format foto, atau telat input klaim, muncul notifikasi </text:span><text:span text:style-name="T13">alert</text:span><text:span text:style-name="T11"> yang jelas bagi pengguna, bukan </text:span><text:span text:style-name="T13">error page</text:span><text:span text:style-name="T11"> bawaan framework (seperti error 500 Laravel/Next.js).</text:span></text:p>
              </text:list-item>
            </text:list>
          </text:list-item>
        </text:list>
        <text:h text:style-name="P2" text:outline-level="2">Menjawab Pertanyaan No. 14 (Sangat Krusial untuk Jawaban ke Dosen!)</text:h>
        <text:p text:style-name="P16"><text:span text:style-name="T8">Pertanyaan Dosen:</text:span> <text:span text:style-name="T6">"Penentuan gaji seperti apa? Apakah komponen gaji dikaitkan dengan posisi atau individu?"</text:span></text:p>
        <text:p text:style-name="P129">Jawaban Standar HRIS Profesional (Bisa kamu jadikan acuan sistemmu):</text:p>
        <text:p text:style-name="P54">Idealnya, penentuan gaji menggunakan <text:span text:style-name="T8">kombinasi keduanya (Hybrid)</text:span>, namun <text:span text:style-name="T8">didahului oleh Posisi/Jabatan</text:span>, baru disesuaikan berdasarkan <text:span text:style-name="T8">Individu</text:span>.</text:p>
        <text:p text:style-name="P54">Cara menjelaskan ke dosen:</text:p>
        <text:list text:style-name="L24">
          <text:list-item>
            <text:p text:style-name="P131">Gaji Pokok &amp; Tunjangan Jabatan dikaitkan dengan POSISI:</text:p>
            <text:p text:style-name="P121">Setiap posisi memiliki rentang (<text:span text:style-name="T6">grade</text:span>) gaji standar. Misalnya, siapa pun yang menjabat sebagai <text:span text:style-name="T6">Manager Administrasi</text:span>, Gaji Pokok dan Tunjangan Jabatannya sudah dipatok sama di angka <text:span text:style-name="T9">$X$</text:span> Rupiah karena beban tanggung jawabnya melekat pada posisi tersebut.</text:p>
          </text:list-item>
          <text:list-item>
            <text:p text:style-name="P131">Tunjangan Sifatnya INDIVIDU:</text:p>
            <text:p text:style-name="P121">Komponen gaji seperti <text:span text:style-name="T6">Tunjangan Masa Kerja</text:span>, <text:span text:style-name="T6">Tunjangan Keluarga</text:span> (dilihat dari status pernikahan/jumlah anak di data pribadi), atau <text:span text:style-name="T6">Insentif Performa</text:span> (dilihat dari capaian individu) dikaitkan langsung dengan data individu pegawai yang bersangkutan.</text:p>
          </text:list-item>
        </text:list>
        <text:p text:style-name="P129">Rekomendasi implementasi cepat di aplikasimu:</text:p>
        <text:p text:style-name="P33"><text:span text:style-name="T11">Agar codingan tidak rumit di sisa 20% ini, buatlah skema: </text:span><text:span text:style-name="T12">Gaji Pokok di-set berdasarkan Jabatan (Posisi)</text:span><text:span text:style-name="T11"> saat HR melakukan CRUD Jabatan. Kemudian di tabel </text:span><text:span text:style-name="Source_20_Text"><text:span text:style-name="T14">employee_financials</text:span></text:span><text:span text:style-name="T11"> (atau data keuangan pegawai), berikan satu field </text:span><text:span text:style-name="T13">tunjangan_kondisional</text:span><text:span text:style-name="T11"> jika individu tersebut memiliki bonus atau tunjangan pribadi tambahan.</text:span></text:p>
        <text:p text:style-name="P54"><text:span text:style-name="T8">Saran Tambahan:</text:span> Eksekusi Prioritas 1 malam ini juga, karena jika struktur user dan role baru sudah rapi, sisa pengerjaan CRUD dan logika bisnis ke depannya akan jauh lebih mengalir lancar!</text:p>
      </text:section>
      <text:p text:style-name="P135"/>
      <text:p text:style-name="P30">Melihat sisa progres aplikasi kamu yang sudah 80% dan adanya 14 poin revisi dari dosen, kunci utamanya adalah <text:span text:style-name="T7">strategi eksekusi</text:span>. Jangan dikerjakan acak. Kamu harus mendahului revisi yang sifatnya <text:span text:style-name="T7">merusak/mengubah struktur database (Breaking Changes)</text:span>, baru kemudian fitur CRUD, logika bisnis, dan terakhir kosmetik (bahasa/pesan error).</text:p>
      <text:p text:style-name="P17">Berikut adalah urutan prioritas kerja (Roadmap) yang paling efisien agar codingan kamu tidak tumpang tindih:</text:p>
      <text:h text:style-name="P1" text:outline-level="2"><text:soft-page-break/>PRIORITAS 1: Struktur Database &amp; Auth (Kerjakan Ini Pertama Kali)</text:h>
      <text:p text:style-name="P17">Jika ini tidak didahului, semua codingan Controller dan API yang sudah kamu buat bisa <text:span text:style-name="T5">error</text:span> massal.</text:p>
      <text:list text:style-name="L25">
        <text:list-item>
          <text:p text:style-name="P50"><text:span text:style-name="T3">Langkah 1 (Poin 3): Pindahkan </text:span><text:span text:style-name="Source_20_Text"><text:span text:style-name="T3">status_akun</text:span></text:span><text:span text:style-name="T3"> dan </text:span><text:span text:style-name="Source_20_Text"><text:span text:style-name="T3">email</text:span></text:span><text:span text:style-name="T3"> ke tabel </text:span><text:span text:style-name="Source_20_Text"><text:span text:style-name="T3">users</text:span></text:span><text:span text:style-name="T3">.</text:span></text:p>
          <text:list>
            <text:list-item>
              <text:p text:style-name="P50"><text:span text:style-name="T4">Action:</text:span><text:span text:style-name="T2"> Jalankan migrasi database baru. Pastikan tabel </text:span><text:span text:style-name="Source_20_Text"><text:span text:style-name="T2">users</text:span></text:span><text:span text:style-name="T2"> memiliki </text:span><text:span text:style-name="Source_20_Text"><text:span text:style-name="T2">employee_id</text:span></text:span><text:span text:style-name="T2"> (atau </text:span><text:span text:style-name="Source_20_Text"><text:span text:style-name="T2">pegawai_id</text:span></text:span><text:span text:style-name="T2">) sebagai relasi, serta simpan </text:span><text:span text:style-name="Source_20_Text"><text:span text:style-name="T2">email</text:span></text:span><text:span text:style-name="T2">, </text:span><text:span text:style-name="Source_20_Text"><text:span text:style-name="T2">password</text:span></text:span><text:span text:style-name="T2">, dan </text:span><text:span text:style-name="Source_20_Text"><text:span text:style-name="T2">status_akun</text:span></text:span><text:span text:style-name="T2"> di sana.</text:span></text:p>
            </text:list-item>
          </text:list>
        </text:list-item>
        <text:list-item>
          <text:p text:style-name="P24">Langkah 2 (Poin 1): Update <text:span text:style-name="T5">Role</text:span> Spesifik di Sistem.</text:p>
          <text:list>
            <text:list-item>
              <text:p text:style-name="P50"><text:span text:style-name="T2">Ubah ENUM atau seeder role kamu di tabel </text:span><text:span text:style-name="Source_20_Text"><text:span text:style-name="T2">users</text:span></text:span><text:span text:style-name="T2"> atau tabel </text:span><text:span text:style-name="Source_20_Text"><text:span text:style-name="T2">roles</text:span></text:span><text:span text:style-name="T2"> menjadi:</text:span></text:p>
              <text:list>
                <text:list-item>
                  <text:p text:style-name="P50"><text:span text:style-name="Source_20_Text"><text:span text:style-name="T2">Direktur Utama</text:span></text:span><text:span text:style-name="T2"> (Pimpinan)</text:span></text:p>
                </text:list-item>
                <text:list-item>
                  <text:p text:style-name="P50"><text:span text:style-name="Source_20_Text"><text:span text:style-name="T2">Manager Keuangan</text:span></text:span><text:span text:style-name="T2"> (Keuangan)</text:span></text:p>
                </text:list-item>
                <text:list-item>
                  <text:p text:style-name="P50"><text:span text:style-name="Source_20_Text"><text:span text:style-name="T2">Pegawai</text:span></text:span><text:span text:style-name="T2"> (Staff)</text:span></text:p>
                </text:list-item>
                <text:list-item>
                  <text:p text:style-name="P50"><text:span text:style-name="Source_20_Text"><text:span text:style-name="T2">Wakil Direktur</text:span></text:span><text:span text:style-name="T2"> (HR)</text:span></text:p>
                </text:list-item>
                <text:list-item>
                  <text:p text:style-name="P50"><text:span text:style-name="Source_20_Text"><text:span text:style-name="T2">Manager Administrasi</text:span></text:span><text:span text:style-name="T2"> (Manager)</text:span></text:p>
                </text:list-item>
              </text:list>
            </text:list-item>
          </text:list>
        </text:list-item>
      </text:list>
      <text:h text:style-name="P1" text:outline-level="2">PRIORITAS 2: CRUD Data Master (Pondasi Form Pegawai)</text:h>
      <text:p text:style-name="P17">Form input pegawai membutuhkan data Jabatan dan Unit. Jadi, buat fungsi CRUD ini terlebih dahulu sebelum masuk ke form pegawainya.</text:p>
      <text:list text:style-name="L26">
        <text:list-item>
          <text:p text:style-name="P25">Langkah 3 (Poin 4, 5, 6): Buat Fungsi CRUD Master.</text:p>
          <text:list>
            <text:list-item>
              <text:p text:style-name="P21">CRUD Jabatan (terhubung dengan penamaan baru: Direktur Utama, Manager Administrasi, dll).</text:p>
            </text:list-item>
            <text:list-item>
              <text:p text:style-name="P21">CRUD Unit / Bidang.</text:p>
            </text:list-item>
            <text:list-item>
              <text:p text:style-name="P21">CRUD Kategori <text:span text:style-name="T5">Daily Log</text:span>.</text:p>
            </text:list-item>
          </text:list>
        </text:list-item>
        <text:list-item>
          <text:p text:style-name="P25">Langkah 4 (Poin 2 &amp; Revisi Poin 3): Lengkapi Data Pegawai &amp; Konsistensi Istilah.</text:p>
          <text:list>
            <text:list-item>
              <text:p text:style-name="P21"><text:span text:style-name="T5">Action:</text:span> Buka form "Tambah Pegawai". Ganti semua teks "Karyawan" menjadi <text:span text:style-name="T7">"Pegawai"</text:span> (di UI, tombol, maupun penamaan field jika memungkinkan).</text:p>
            </text:list-item>
            <text:list-item>
              <text:p text:style-name="P51"><text:soft-page-break/><text:span text:style-name="T3">Poin 7:</text:span><text:span text:style-name="T2"> Di form ini, buat logika </text:span><text:span text:style-name="T4">Conditional Rendering</text:span><text:span text:style-name="T2"> (Javascript/Flutter/React). Jika HR memilih status </text:span><text:span text:style-name="Source_20_Text"><text:span text:style-name="T2">Kontrak</text:span></text:span><text:span text:style-name="T2"> atau </text:span><text:span text:style-name="Source_20_Text"><text:span text:style-name="T2">Magang</text:span></text:span><text:span text:style-name="T2">, maka </text:span><text:span text:style-name="T4">field</text:span><text:span text:style-name="T2"> </text:span><text:span text:style-name="Source_20_Text"><text:span text:style-name="T2">Tanggal Berakhir Kontrak</text:span></text:span><text:span text:style-name="T2"> wajib muncul dan diisi (</text:span><text:span text:style-name="Source_20_Text"><text:span text:style-name="T2">required</text:span></text:span><text:span text:style-name="T2">). Jika memilih </text:span><text:span text:style-name="Source_20_Text"><text:span text:style-name="T2">Tetap</text:span></text:span><text:span text:style-name="T2">, </text:span><text:span text:style-name="T4">field</text:span><text:span text:style-name="T2"> tersebut disembunyikan/dikosongkan.</text:span></text:p>
            </text:list-item>
          </text:list>
        </text:list-item>
      </text:list>
      <text:h text:style-name="P1" text:outline-level="2">PRIORITAS 3: Logika Bisnis &amp; Fitur (Absensi &amp; Cuti)</text:h>
      <text:p text:style-name="P17">Setelah data master aman, masuk ke fungsionalitas sistem.</text:p>
      <text:list text:style-name="L27">
        <text:list-item>
          <text:p text:style-name="P26">Langkah 5 (Poin 10 &amp; 12): Fitur Absensi.</text:p>
          <text:list>
            <text:list-item>
              <text:p text:style-name="P22"><text:span text:style-name="T7">Absen Pulang wajib Foto:</text:span> Tambahkan komponen kamera/upload file khusus pada method API/Controller absen pulang.</text:p>
            </text:list-item>
            <text:list-item>
              <text:p text:style-name="P52"><text:span text:style-name="T3">Filter Periode &amp; Durasi Telat:</text:span><text:span text:style-name="T2"> Di halaman riwayat absen (sisi Pegawai maupun HR), tambahkan komponen filter tanggal (Start Date - End Date). Di tabel database absen, buat </text:span><text:span text:style-name="T4">field</text:span><text:span text:style-name="T2"> </text:span><text:span text:style-name="Source_20_Text"><text:span text:style-name="T2">durasi_telat</text:span></text:span><text:span text:style-name="T2"> (menghitung selisih jam masuk pegawai dengan jam masuk ketentuan dalam satuan menit, misal: 15 menit).</text:span></text:p>
            </text:list-item>
          </text:list>
        </text:list-item>
        <text:list-item>
          <text:p text:style-name="P26">Langkah 6 (Poin 8, 11, 13): Fitur Cuti &amp; Klaim.</text:p>
          <text:list>
            <text:list-item>
              <text:p text:style-name="P52"><text:span text:style-name="T3">Cuti Bersama (Poin 8):</text:span><text:span text:style-name="T2"> Buat satu halaman/tabel statis berisi daftar hari libur &amp; cuti bersama tahun ini agar bisa dibaca oleh akun dengan role </text:span><text:span text:style-name="Source_20_Text"><text:span text:style-name="T2">Pegawai</text:span></text:span><text:span text:style-name="T2">.</text:span></text:p>
            </text:list-item>
            <text:list-item>
              <text:p text:style-name="P52"><text:span text:style-name="T3">Validasi Cuti Melahirkan (Poin 11):</text:span><text:span text:style-name="T2"> Di backend (Controller), sebelum menyimpan pengajuan cuti, beri validasi: </text:span><text:span text:style-name="Source_20_Text"><text:span text:style-name="T2">if (kategori == 'Melahirkan' &amp;&amp; pegawai.jenis_kelamin != 'Perempuan') { return error; }</text:span></text:span><text:span text:style-name="T2">.</text:span></text:p>
            </text:list-item>
            <text:list-item>
              <text:p text:style-name="P52"><text:span text:style-name="T3">Tanggal Klaim (Poin 13):</text:span><text:span text:style-name="T2"> Pada form pengajuan klaim keuangan, set validation pada input tanggal agar </text:span><text:span text:style-name="Source_20_Text"><text:span text:style-name="T2">min = date('Y-m-d')</text:span></text:span><text:span text:style-name="T2"> (hari ini). Pegawai tidak boleh memilih tanggal kemarin (backdate).</text:span></text:p>
            </text:list-item>
          </text:list>
        </text:list-item>
      </text:list>
      <text:h text:style-name="P1" text:outline-level="2">PRIORITAS 4: Finishing &amp; Handover</text:h>
      <text:list text:style-name="L28">
        <text:list-item>
          <text:p text:style-name="P27">Langkah 7 (Poin 9): Pesan Kesalahan (Error Handling).</text:p>
          <text:list>
            <text:list-item>
              <text:p text:style-name="P53"><text:span text:style-name="T2">Rapikan </text:span><text:span text:style-name="Source_20_Text"><text:span text:style-name="T2">try-catch</text:span></text:span><text:span text:style-name="T2"> di backend atau validasi request. Pastikan jika ada gagal login, salah format foto, atau telat input klaim, muncul notifikasi </text:span><text:span text:style-name="T4">alert</text:span><text:span text:style-name="T2"> yang jelas bagi pengguna, bukan </text:span><text:span text:style-name="T4">error page</text:span><text:span text:style-name="T2"> bawaan framework (seperti error 500 Laravel/Next.js).</text:span></text:p>
            </text:list-item>
          </text:list>
        </text:list-item>
      </text:list>
      <text:h text:style-name="P1" text:outline-level="2"><text:soft-page-break/>Menjawab Pertanyaan No. 14 (Sangat Krusial untuk Jawaban ke Dosen!)</text:h>
      <text:p text:style-name="P15"><text:span text:style-name="T7">Pertanyaan Dosen:</text:span> <text:span text:style-name="T5">"Penentuan gaji seperti apa? Apakah komponen gaji dikaitkan dengan posisi atau individu?"</text:span></text:p>
      <text:p text:style-name="P28">Jawaban Standar HRIS Profesional (Bisa kamu jadikan acuan sistemmu):</text:p>
      <text:p text:style-name="P17">Idealnya, penentuan gaji menggunakan <text:span text:style-name="T7">kombinasi keduanya (Hybrid)</text:span>, namun <text:span text:style-name="T7">didahului oleh Posisi/Jabatan</text:span>, baru disesuaikan berdasarkan <text:span text:style-name="T7">Individu</text:span>.</text:p>
      <text:p text:style-name="P17">Cara menjelaskan ke dosen:</text:p>
      <text:list text:style-name="L29">
        <text:list-item>
          <text:p text:style-name="P29">Gaji Pokok &amp; Tunjangan Jabatan dikaitkan dengan POSISI:</text:p>
          <text:p text:style-name="P23">Setiap posisi memiliki rentang (<text:span text:style-name="T5">grade</text:span>) gaji standar. Misalnya, siapa pun yang menjabat sebagai <text:span text:style-name="T5">Manager Administrasi</text:span>, Gaji Pokok dan Tunjangan Jabatannya sudah dipatok sama di angka $X$ Rupiah karena beban tanggung jawabnya melekat pada posisi tersebut.</text:p>
        </text:list-item>
        <text:list-item>
          <text:p text:style-name="P29">Tunjangan Sifatnya INDIVIDU:</text:p>
          <text:p text:style-name="P23">Komponen gaji seperti <text:span text:style-name="T5">Tunjangan Masa Kerja</text:span>, <text:span text:style-name="T5">Tunjangan Keluarga</text:span> (dilihat dari status pernikahan/jumlah anak di data pribadi), atau <text:span text:style-name="T5">Insentif Performa</text:span> (dilihat dari capaian individu) dikaitkan langsung dengan data individu pegawai yang bersangkutan.</text:p>
        </text:list-item>
      </text:list>
      <text:p text:style-name="P28">Rekomendasi implementasi cepat di aplikasimu:</text:p>
      <text:p text:style-name="P31"><text:span text:style-name="T2">Agar codingan tidak rumit di sisa 20% ini, buatlah skema: </text:span><text:span text:style-name="T3">Gaji Pokok di-set berdasarkan Jabatan (Posisi)</text:span><text:span text:style-name="T2"> saat HR melakukan CRUD Jabatan. Kemudian di tabel </text:span><text:span text:style-name="Source_20_Text"><text:span text:style-name="T2">employee_financials</text:span></text:span><text:span text:style-name="T2"> (atau data keuangan pegawai), berikan satu field </text:span><text:span text:style-name="T4">tunjangan_kondisional</text:span><text:span text:style-name="T2"> jika individu tersebut memiliki bonus atau tunjangan pribadi tambahan.</text:span></text:p>
      <text:p text:style-name="P1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5T16:49:55.051484275</meta:creation-date>
    <meta:generator>LibreOffice/24.2.7.2$Linux_X86_64 LibreOffice_project/420$Build-2</meta:generator>
    <dc:date>2026-05-26T00:16:00.053833461</dc:date>
    <meta:editing-duration>PT4M25S</meta:editing-duration>
    <meta:editing-cycles>1</meta:editing-cycles>
    <meta:document-statistic meta:table-count="0" meta:image-count="0" meta:object-count="0" meta:page-count="10" meta:paragraph-count="184" meta:word-count="2277" meta:character-count="15621" meta:non-whitespace-character-count="13629"/>
  </office:meta>
</office:document-meta>
</file>